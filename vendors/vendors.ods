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761in"/>
    </style:style>
    <style:style style:name="co3" style:family="table-column">
      <style:table-column-properties fo:break-before="auto" style:column-width="3.398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1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Photometric Interpretation</text:p>
          </table:table-cell>
          <table:table-cell office:value-type="string" calcext:value-type="string">
            <text:p>Pixel Spacing</text:p>
          </table:table-cell>
          <table:table-cell office:value-type="string" calcext:value-type="string">
            <text:p>Rescale Intercept</text:p>
          </table:table-cell>
          <table:table-cell office:value-type="string" calcext:value-type="string">
            <text:p>Rescale Slope</text:p>
          </table:table-cell>
          <table:table-cell office:value-type="string" calcext:value-type="string">
            <text:p>Recale Type</text:p>
          </table:table-cell>
          <table:table-cell office:value-type="string" calcext:value-type="string">
            <text:p>VOILUTFunction</text:p>
          </table:table-cell>
          <table:table-cell office:value-type="string" calcext:value-type="string">
            <text:p>Window Center witdh explanation</text:p>
          </table:table-cell>
          <table:table-cell office:value-type="string" calcext:value-type="string">
            <text:p>PresentationLutShap</text:p>
          </table:table-cell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Lorad, A Hologic Company</text:p>
          </table:table-cell>
          <table:table-cell office:value-type="string" calcext:value-type="string">
            <text:p>DSM</text:p>
          </table:table-cell>
          <table:table-cell office:value-type="string" calcext:value-type="string">
            <text:p>MONOCHROME1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FUJIFILM Corporation</text:p>
          </table:table-cell>
          <table:table-cell office:value-type="string" calcext:value-type="string">
            <text:p>Clearview Csm</text:p>
          </table:table-cell>
          <table:table-cell office:value-type="string" calcext:value-type="string">
            <text:p>MONOCHROME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1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1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1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Selenia Dimensions</text:p>
          </table:table-cell>
          <table:table-cell office:value-type="string" calcext:value-type="string">
            <text:p>MONOCHROME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Lorad Selenia</text:p>
          </table:table-cell>
          <table:table-cell office:value-type="string" calcext:value-type="string">
            <text:p>MONOCHROME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-MX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Selenia Dimensions</text:p>
          </table:table-cell>
          <table:table-cell office:value-type="string" calcext:value-type="string">
            <text:p>MONOCHROME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IMS s.r.l.</text:p>
          </table:table-cell>
          <table:table-cell office:value-type="string" calcext:value-type="string">
            <text:p>GIOTTO IMAGE 3DL</text:p>
          </table:table-cell>
          <table:table-cell office:value-type="string" calcext:value-type="string">
            <text:p>MONOCHROME2</text:p>
          </table:table-cell>
          <table:table-cell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['CURRENT', 'STANDARD', 'CONTRAST', 'SMOOTH', 'CUSTOM']</text:p>
          </table:table-cell>
          <table:table-cell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IMS s.r.l.</text:p>
          </table:table-cell>
          <table:table-cell office:value-type="string" calcext:value-type="string">
            <text:p>GIOTTO CLASS</text:p>
          </table:table-cell>
          <table:table-cell office:value-type="string" calcext:value-type="string">
            <text:p>MONOCHROME2</text:p>
          </table:table-cell>
          <table:table-cell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['CURRENT', 'STANDARD', 'CONTRAST', 'SMOOTH', 'CUSTOM']</text:p>
          </table:table-cell>
          <table:table-cell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IMS GIOTTO S.p.A.</text:p>
          </table:table-cell>
          <table:table-cell office:value-type="string" calcext:value-type="string">
            <text:p>GIOTTO CLASS</text:p>
          </table:table-cell>
          <table:table-cell office:value-type="string" calcext:value-type="string">
            <text:p>MONOCHROME2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['CURRENT', 'STANDARD', 'CONTRAST', 'SMOOTH', 'CUSTOM']</text:p>
          </table:table-cell>
          <table:table-cell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Mammomat Inspiration</text:p>
          </table:table-cell>
          <table:table-cell office:value-type="string" calcext:value-type="string">
            <text:p>MONOCHROME2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inear LUT</text:p>
          </table:table-cell>
          <table:table-cell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Planmed</text:p>
          </table:table-cell>
          <table:table-cell office:value-type="string" calcext:value-type="string">
            <text:p>Planmed Nuance</text:p>
          </table:table-cell>
          <table:table-cell office:value-type="string" calcext:value-type="string">
            <text:p>MONOCHROME1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Default W/L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1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1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4.1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4.1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1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4.1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FUJIFILM Corporation</text:p>
          </table:table-cell>
          <table:table-cell office:value-type="string" calcext:value-type="string">
            <text:p>Clearview Csm</text:p>
          </table:table-cell>
          <table:table-cell office:value-type="string" calcext:value-type="string">
            <text:p>MONOCHROME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HEALTHCARE</text:p>
          </table:table-cell>
          <table:table-cell office:value-type="string" calcext:value-type="string">
            <text:p>Senograph Pristina</text:p>
          </table:table-cell>
          <table:table-cell office:value-type="string" calcext:value-type="string">
            <text:p>MONOCHROME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HEALTHCARE</text:p>
          </table:table-cell>
          <table:table-cell office:value-type="string" calcext:value-type="string">
            <text:p>Senograph Pristina</text:p>
          </table:table-cell>
          <table:table-cell office:value-type="string" calcext:value-type="string">
            <text:p>MONOCHROME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USER', 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HEALTHCARE</text:p>
          </table:table-cell>
          <table:table-cell office:value-type="string" calcext:value-type="string">
            <text:p>Senograph Pristina</text:p>
          </table:table-cell>
          <table:table-cell office:value-type="string" calcext:value-type="string">
            <text:p>MONOCHROME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Identity</text:p>
          </table:table-cell>
        </table:table-row>
        <table:table-row table:style-name="ro1">
          <table:table-cell office:value-type="string" calcext:value-type="string">
            <text:p>InBreast*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MammoNovation</text:p>
          </table:table-cell>
          <table:table-cell office:value-type="string" calcext:value-type="string">
            <text:p>MONOCHROME2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* InBreast Información de acuerdo al paper. Dataset anonimizado</text:p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Ver: ImagerPixelSpacing y Pixel Spacing (Preferiblemente ImagerPixelSpacing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: PhotometricInterpretation / PresentationIntetentType / PresentationLUTSha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dow Center y Window width se refieren a la precisión de valores. Para 8-bits: Window Center = 128 y Window Width 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 no tenemos tamaño del pixel podemos extraer de tamaño del detector dividido de número de pixels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: DE codigo (buscar orige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If VOILutFunction is not defined for GE, it implies that the voi_lut_function is actually SIGMOID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"SIGMOID as VOILutFunction requires a window center and width value."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"dicom_tags"][DICOM_MANUFACTURER] in ["Agfa-Gevaert", "LORAD", "GE MEDICAL SYSTEMS", "Planmed", "FUJIFILM Corporation", "IMS GIOTTO S.p.A.", "SIEMENS", "HOLOGIC, Inc."]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fo </text:p>
          </table:table-cell>
          <table:table-cell office:value-type="string" calcext:value-type="string">
            <text:p><text:s/>https://dicom.innolitics.com/ciods/nm-image/voi-lut/00281056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J54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2:26:12.079890214</meta:creation-date>
    <dc:date>2026-06-18T17:00:39.487299824</dc:date>
    <meta:editing-duration>PT2H45M47S</meta:editing-duration>
    <meta:editing-cycles>7</meta:editing-cycles>
    <meta:generator>LibreOffice/7.3.7.2$Linux_X86_64 LibreOffice_project/30$Build-2</meta:generator>
    <meta:document-statistic meta:table-count="1" meta:cell-count="493" meta:object-count="0"/>
  </office:meta>
</office:document-meta>
</file>